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7.241cm"/>
    </style:style>
    <style:style style:name="co5" style:family="table-column">
      <style:table-column-properties fo:break-before="auto" style:column-width="17.207cm"/>
    </style:style>
    <style:style style:name="co6" style:family="table-column">
      <style:table-column-properties fo:break-before="auto" style:column-width="1.875cm"/>
    </style:style>
    <style:style style:name="co7" style:family="table-column">
      <style:table-column-properties fo:break-before="auto" style:column-width="0.6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8000"/>
    </style:style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I34"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ce18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Digital inp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cho left</text:p>
          </table:table-cell>
          <table:table-cell/>
          <table:table-cell office:value-type="string" calcext:value-type="string">
            <text:p>Other input:</text:p>
          </table:table-cell>
          <table:table-cell office:value-type="string" calcext:value-type="string">
            <text:p>LEFT battery alarm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acho right</text:p>
          </table:table-cell>
          <table:table-cell table:number-columns-repeated="2"/>
          <table:table-cell office:value-type="string" calcext:value-type="string">
            <text:p>RIGHT battery alar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oors lef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oors righ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gital outp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enab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ing HF antenna deploy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trol +12V to Spartan 2 O2 sensor (30s delay after engine start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 Spartan 2 O2 sensor linear voltage outp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immer bus (input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ce aler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ne wire</text:p>
          </table:table-cell>
          <table:table-cell/>
          <table:table-cell office:value-type="string" calcext:value-type="string">
            <text:p>Cabin temp senso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rake temp senso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WF sensor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P Based</text:p>
          </table:table-cell>
          <table:table-cell/>
          <table:table-cell office:value-type="string" calcext:value-type="string">
            <text:p>Climate settings, control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USB #0</text:p>
          </table:table-cell>
          <table:table-cell table:style-name="Default"/>
          <table:table-cell office:value-type="string" calcext:value-type="string">
            <text:p>TFT Displ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B #1</text:p>
          </table:table-cell>
          <table:table-cell table:style-name="Default"/>
          <table:table-cell office:value-type="string" calcext:value-type="string">
            <text:p>EFI Power syst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B #2</text:p>
          </table:table-cell>
          <table:table-cell table:style-name="Default"/>
          <table:table-cell office:value-type="string" calcext:value-type="string">
            <text:p>Panel connector (storag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B #3</text:p>
          </table:table-cell>
          <table:table-cell table:style-name="Default"/>
          <table:table-cell office:value-type="string" calcext:value-type="string">
            <text:p>Panel connector (storage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TY3</text:p>
          </table:table-cell>
          <table:table-cell table:style-name="Default"/>
          <table:table-cell office:value-type="string" calcext:value-type="string">
            <text:p>Battery backup controll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TY5</text:p>
          </table:table-cell>
          <table:table-cell table:style-name="Default"/>
          <table:table-cell table:style-name="Default" office:value-type="string" calcext:value-type="string">
            <text:p>HF Radi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p40" table:style-name="ta1">
        <table:table-column table:style-name="co2" table:default-cell-style-name="ce19"/>
        <table:table-column table:style-name="co1" table:default-cell-style-name="ce17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escription</text:p>
          </table:table-cell>
          <table:table-cell office:value-type="string" calcext:value-type="string">
            <text:p>Pin</text:p>
          </table:table-cell>
          <table:table-cell table:style-name="ce17" office:value-type="string" calcext:value-type="string">
            <text:p>Used</text:p>
          </table:table-cell>
          <table:table-cell office:value-type="string" calcext:value-type="string">
            <text:p>Monarco function</text:p>
          </table:table-cell>
          <table:table-cell table:number-columns-repeated="2"/>
          <table:table-cell office:value-type="string" calcext:value-type="string">
            <text:p>Lidar </text:p>
          </table:table-cell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3 power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V power</text:p>
          </table:table-cell>
          <table:table-cell table:formula="of:=[.B2]+1" office:value-type="float" office:value="2" calcext:value-type="float">
            <text:p>2</text:p>
          </table:table-cell>
          <table:table-cell table:style-name="ce20"/>
          <table:table-cell office:value-type="string" calcext:value-type="string">
            <text:p>Power to R-Pi</text:p>
          </table:table-cell>
          <table:table-cell table:number-columns-repeated="2"/>
          <table:table-cell office:value-type="string" calcext:value-type="string">
            <text:p>5V,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IO 2 (SDA)</text:p>
          </table:table-cell>
          <table:table-cell table:formula="of:=[.B3]+1" office:value-type="float" office:value="3" calcext:value-type="float">
            <text:p>3</text:p>
          </table:table-cell>
          <table:table-cell table:style-name="ce20"/>
          <table:table-cell office:value-type="string" calcext:value-type="string">
            <text:p>I2C-1 data, RT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V power</text:p>
          </table:table-cell>
          <table:table-cell table:formula="of:=[.B4]+1" office:value-type="float" office:value="4" calcext:value-type="float">
            <text:p>4</text:p>
          </table:table-cell>
          <table:table-cell table:style-name="ce20"/>
          <table:table-cell office:value-type="string" calcext:value-type="string">
            <text:p>Power to R-P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IO 3 (SCL)</text:p>
          </table:table-cell>
          <table:table-cell table:formula="of:=[.B5]+1" office:value-type="float" office:value="5" calcext:value-type="float">
            <text:p>5</text:p>
          </table:table-cell>
          <table:table-cell table:style-name="ce20"/>
          <table:table-cell office:value-type="string" calcext:value-type="string">
            <text:p>I2C-1 clock, RT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und</text:p>
          </table:table-cell>
          <table:table-cell table:formula="of:=[.B6]+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PIO 4 (GPCLK0)</text:p>
          </table:table-cell>
          <table:table-cell table:formula="of:=[.B7]+1"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Uart TX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IO 14 (TXD)</text:p>
          </table:table-cell>
          <table:table-cell table:formula="of:=[.B8]+1" office:value-type="float" office:value="8" calcext:value-type="float">
            <text:p>8</text:p>
          </table:table-cell>
          <table:table-cell table:style-name="ce20"/>
          <table:table-cell office:value-type="string" calcext:value-type="string">
            <text:p>Uart TX (RS4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und</text:p>
          </table:table-cell>
          <table:table-cell table:formula="of:=[.B9]+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IO 15 (RXD)</text:p>
          </table:table-cell>
          <table:table-cell table:formula="of:=[.B10]+1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Uart RX (RS4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IO 17</text:p>
          </table:table-cell>
          <table:table-cell table:formula="of:=[.B11]+1"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LEFT Battery alarm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PIO 18 (PCM_CLK)</text:p>
          </table:table-cell>
          <table:table-cell table:formula="of:=[.B12]+1" office:value-type="float" office:value="12" calcext:value-type="float">
            <text:p>12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GPIO 27</text:p>
          </table:table-cell>
          <table:table-cell table:formula="of:=[.B13]+1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RIGHT Battery al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nd</text:p>
          </table:table-cell>
          <table:table-cell table:formula="of:=[.B14]+1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GND, Bl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IO 22</text:p>
          </table:table-cell>
          <table:table-cell table:formula="of:=[.B15]+1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DA,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IO 23</text:p>
          </table:table-cell>
          <table:table-cell table:formula="of:=[.B16]+1" office:value-type="float" office:value="16" calcext:value-type="float">
            <text:p>16</text:p>
          </table:table-cell>
          <table:table-cell table:style-name="ce20"/>
          <table:table-cell office:value-type="string" calcext:value-type="string">
            <text:p>Optional, MCU PB7</text:p>
          </table:table-cell>
          <table:table-cell table:number-columns-repeated="2"/>
          <table:table-cell office:value-type="string" calcext:value-type="string">
            <text:p>SCL, 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V3 power</text:p>
          </table:table-cell>
          <table:table-cell table:formula="of:=[.B17]+1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PIO 24</text:p>
          </table:table-cell>
          <table:table-cell table:formula="of:=[.B18]+1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Optional, MCU PB8</text:p>
          </table:table-cell>
          <table:table-cell table:number-columns-repeated="3"/>
          <table:table-cell office:value-type="string" calcext:value-type="string">
            <text:p>spare_io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IO 10 (MOSI)</text:p>
          </table:table-cell>
          <table:table-cell table:formula="of:=[.B19]+1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SPI0 – MCU PC2/USAR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und</text:p>
          </table:table-cell>
          <table:table-cell table:formula="of:=[.B20]+1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IO 9 (MISO)</text:p>
          </table:table-cell>
          <table:table-cell table:formula="of:=[.B21]+1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SPI0 – MCU PC3/USAR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IO 25</text:p>
          </table:table-cell>
          <table:table-cell table:formula="of:=[.B22]+1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spare_i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IO 11 (SCLK)</text:p>
          </table:table-cell>
          <table:table-cell table:formula="of:=[.B23]+1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SPI0 – MCU PC4/USAR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IO 8 (CE0)</text:p>
          </table:table-cell>
          <table:table-cell table:formula="of:=[.B24]+1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SPI0 – MCU PC4/USAR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und</text:p>
          </table:table-cell>
          <table:table-cell table:formula="of:=[.B25]+1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IO 7 (CE1)</text:p>
          </table:table-cell>
          <table:table-cell table:formula="of:=[.B26]+1"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rts3/rx485_de3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string" calcext:value-type="string">
            <text:p>GPIO 0 (ID_SD)</text:p>
          </table:table-cell>
          <table:table-cell table:formula="of:=[.B27]+1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I2C-0 data – ID EEP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IO 1 (ID_SC)</text:p>
          </table:table-cell>
          <table:table-cell table:formula="of:=[.B28]+1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I2C-0 clock – ID EEPROM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GPIO 5</text:p>
          </table:table-cell>
          <table:table-cell table:formula="of:=[.B29]+1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Optional, MCU PA4</text:p>
          </table:table-cell>
          <table:table-cell table:number-columns-repeated="3"/>
          <table:table-cell office:value-type="string" calcext:value-type="string">
            <text:p>Uart RX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nd</text:p>
          </table:table-cell>
          <table:table-cell table:formula="of:=[.B30]+1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PIO 6</text:p>
          </table:table-cell>
          <table:table-cell table:formula="of:=[.B31]+1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Optional, MCU PA3</text:p>
          </table:table-cell>
          <table:table-cell table:number-columns-repeated="3"/>
          <table:table-cell office:value-type="string" calcext:value-type="string">
            <text:p>cts3/rx485_mode3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string" calcext:value-type="string">
            <text:p>GPIO 12 (PWM0)</text:p>
          </table:table-cell>
          <table:table-cell table:formula="of:=[.B32]+1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Uart TX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IO 13 (PWM1)</text:p>
          </table:table-cell>
          <table:table-cell table:formula="of:=[.B33]+1"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Uart RX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nd</text:p>
          </table:table-cell>
          <table:table-cell table:formula="of:=[.B34]+1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PIO 19 (PCM_FS)</text:p>
          </table:table-cell>
          <table:table-cell table:formula="of:=[.B35]+1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Forceon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IO 16</text:p>
          </table:table-cell>
          <table:table-cell table:formula="of:=[.B36]+1"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LCD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IO 26</text:p>
          </table:table-cell>
          <table:table-cell table:formula="of:=[.B37]+1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ID EEPROM Write Enable, active 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IO 20 (PCM_DIN)</text:p>
          </table:table-cell>
          <table:table-cell table:formula="of:=[.B38]+1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MCU Bootloader Enable, active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und</text:p>
          </table:table-cell>
          <table:table-cell table:formula="of:=[.B39]+1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IO 21 (PCM_DOUT)</text:p>
          </table:table-cell>
          <table:table-cell table:formula="of:=[.B40]+1" office:value-type="float" office:value="40" calcext:value-type="float">
            <text:p>40</text:p>
          </table:table-cell>
          <table:table-cell table:style-name="ce20" office:value-type="string" calcext:value-type="string">
            <text:p>`</text:p>
          </table:table-cell>
          <table:table-cell office:value-type="string" calcext:value-type="string">
            <text:p>MCU RESETn</text:p>
          </table:table-cell>
          <table:table-cell table:number-columns-repeated="7"/>
        </table:table-row>
      </table:table>
      <table:table table:name="Sheet3" table:style-name="ta1" table:print-ranges="Sheet3.A1:Sheet3.E27">
        <table:table-column table:style-name="co1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Annunciat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 (primary) supply fail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5"/>- On ground</text:p>
          </table:table-cell>
          <table:table-cell office:value-type="string" calcext:value-type="string">
            <text:p>Runup checks fail, flight not allowed</text:p>
          </table:table-cell>
          <table:table-cell table:style-name="ce21"/>
          <table:table-cell/>
        </table:table-row>
        <table:table-row table:style-name="ro1">
          <table:table-cell/>
          <table:table-cell office:value-type="string" calcext:value-type="string">
            <text:p><text:s text:c="5"/>- In the air</text:p>
          </table:table-cell>
          <table:table-cell office:value-type="string" calcext:value-type="string">
            <text:p>Relays drop to NC position, powering injectors from the RIGHT supply. Land ASAP.</text:p>
          </table:table-cell>
          <table:table-cell table:style-name="ce2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 (secondary) supply fail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5"/>- On ground</text:p>
          </table:table-cell>
          <table:table-cell office:value-type="string" calcext:value-type="string">
            <text:p>Runup checks fail, flight not allowed</text:p>
          </table:table-cell>
          <table:table-cell table:style-name="ce21"/>
          <table:table-cell/>
        </table:table-row>
        <table:table-row table:style-name="ro1">
          <table:table-cell/>
          <table:table-cell office:value-type="string" calcext:value-type="string">
            <text:p><text:s text:c="5"/>- In the air</text:p>
          </table:table-cell>
          <table:table-cell office:value-type="string" calcext:value-type="string">
            <text:p>Injector power continues to be used from LEFT supply, land ASAP</text:p>
          </table:table-cell>
          <table:table-cell table:style-name="ce2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jector open circuit</text:p>
          </table:table-cell>
          <table:table-cell office:value-type="string" calcext:value-type="string">
            <text:p>Manually disable ECB, switches relay back to NC position, run from RIGHT supply</text:p>
          </table:table-cell>
          <table:table-cell table:style-name="ce23" office:value-type="string" calcext:value-type="string">
            <text:p>via dis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- Engine running on 5 cylinders, land ASAP</text:p>
          </table:table-cell>
          <table:table-cell table:style-name="ce2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jector short circuit</text:p>
          </table:table-cell>
          <table:table-cell office:value-type="string" calcext:value-type="string">
            <text:p>ECB faults, either auto-retry or latch fault (pilot control), reset possible. Land ASAP.</text:p>
          </table:table-cell>
          <table:table-cell table:style-name="ce23" office:value-type="string" calcext:value-type="string">
            <text:p>via displa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onent failure in ECB in fligh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5"/>- ECB power collapses</text:p>
          </table:table-cell>
          <table:table-cell office:value-type="string" calcext:value-type="string">
            <text:p>Relay drops to NC position, powering this injector from the RIGHT supply.</text:p>
          </table:table-cell>
          <table:table-cell table:style-name="ce22"/>
          <table:table-cell/>
        </table:table-row>
        <table:table-row table:style-name="ro1">
          <table:table-cell/>
          <table:table-cell office:value-type="string" calcext:value-type="string">
            <text:p><text:s text:c="5"/>- ECB voltage goes low</text:p>
          </table:table-cell>
          <table:table-cell office:value-type="string" calcext:value-type="string">
            <text:p>Injector is under-powered, will still work to some extent, ultimately relay drops to NC position</text:p>
          </table:table-cell>
          <table:table-cell table:style-name="ce2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ode across relay coil shorts out</text:p>
          </table:table-cell>
          <table:table-cell office:value-type="string" calcext:value-type="string">
            <text:p>ECB fuse blows, injector switches to RIGHT supply.</text:p>
          </table:table-cell>
          <table:table-cell table:style-name="ce2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C output fails, disabling ECB(s)</text:p>
          </table:table-cell>
          <table:table-cell office:value-type="string" calcext:value-type="string">
            <text:p>Can’t happen due to charge pump protection</text:p>
          </table:table-cell>
          <table:table-cell table:style-name="ce2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lay NO output path fails</text:p>
          </table:table-cell>
          <table:table-cell office:value-type="string" calcext:value-type="string">
            <text:p>Manually disable ECB, switches relay back to NC position, run from RIGHT supply</text:p>
          </table:table-cell>
          <table:table-cell table:style-name="ce23" office:value-type="string" calcext:value-type="string">
            <text:p>via dis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3"/>(Can’t tell difference between this case and injector open circuit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munications failure (in flight)</text:p>
          </table:table-cell>
          <table:table-cell office:value-type="string" calcext:value-type="string">
            <text:p>Makes no difference – hardware ECB and relay backup changeover unaffected</text:p>
          </table:table-cell>
          <table:table-cell table:style-name="ce2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chdog timeout in uC</text:p>
          </table:table-cell>
          <table:table-cell office:value-type="string" calcext:value-type="string">
            <text:p>Restart may cause relays to toggle – depends TBD on firmware (enable pin).</text:p>
          </table:table-cell>
          <table:table-cell table:style-name="ce17"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rge power surge on left supply</text:p>
          </table:table-cell>
          <table:table-cell office:value-type="string" calcext:value-type="string">
            <text:p>TVS protects electronics, main fuse on left supply blows, relays revert to right supply</text:p>
          </table:table-cell>
          <table:table-cell table:style-name="ce2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rge power surge on right supply</text:p>
          </table:table-cell>
          <table:table-cell office:value-type="string" calcext:value-type="string">
            <text:p>No effect on electronics, not connected</text:p>
          </table:table-cell>
          <table:table-cell table:style-name="ce17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(Note both supplies have overvoltage protection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" office:value-type="string" calcext:value-type="string">
            <text:p>Note: All operating modes are tested on the ground during pre-flight run-ups. Flight not allowed with any runup test failure.</text:p>
          </table:table-cell>
          <table:table-cell table:number-columns-repeated="4"/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" table:default-cell-style-name="ce17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FT (Primary) rear ATO fuses: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PU Power Lef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verhead lights, Aux transfer pump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GHT (Secondary) rear ATO fuses: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PU Power Righ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A/C Blow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/C Sensors, logic and contro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HF Radio and amplifie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1:42:54.723190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0T21:55:58.880722360</meta:creation-date>
    <dc:date>2021-06-11T11:54:01.792250733</dc:date>
    <meta:editing-duration>P6DT22H44M43S</meta:editing-duration>
    <meta:editing-cycles>36</meta:editing-cycles>
    <meta:generator>LibreOffice/7.0.6.2$Linux_X86_64 LibreOffice_project/00$Build-2</meta:generator>
    <meta:print-date>2021-03-10T13:01:09.503363166</meta:print-date>
    <meta:document-statistic meta:table-count="4" meta:cell-count="258" meta:object-count="0"/>
  </office:meta>
</office:document-meta>
</file>